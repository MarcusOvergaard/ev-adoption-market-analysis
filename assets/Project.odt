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sans-serif"/>
  </office:font-face-decls>
  <office:automatic-styles>
    <style:style style:name="Table1" style:family="table">
      <style:table-properties style:width="6.6931in" table:align="left"/>
    </style:style>
    <style:style style:name="Table1.A" style:family="table-column">
      <style:table-column-properties style:column-width="0.9736in"/>
    </style:style>
    <style:style style:name="Table1.B" style:family="table-column">
      <style:table-column-properties style:column-width="1.075in"/>
    </style:style>
    <style:style style:name="Table1.C" style:family="table-column">
      <style:table-column-properties style:column-width="1.0944in"/>
    </style:style>
    <style:style style:name="Table1.D" style:family="table-column">
      <style:table-column-properties style:column-width="2.4229in"/>
    </style:style>
    <style:style style:name="Table1.E" style:family="table-column">
      <style:table-column-properties style:column-width="1.1271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0.8444in"/>
    </style:style>
    <style:style style:name="Table2.B" style:family="table-column">
      <style:table-column-properties style:column-width="3.1972in"/>
    </style:style>
    <style:style style:name="Table2.C" style:family="table-column">
      <style:table-column-properties style:column-width="0.9403in"/>
    </style:style>
    <style:style style:name="Table2.D" style:family="table-column">
      <style:table-column-properties style:column-width="0.6889in"/>
    </style:style>
    <style:style style:name="Table2.E" style:family="table-column">
      <style:table-column-properties style:column-width="1.0222in"/>
    </style:style>
    <style:style style:name="Table2.A1" style:family="table-cell">
      <style:table-cell-properties style:vertical-align="middle" fo:padding="0.0194in" fo:border="none"/>
    </style:style>
    <style:style style:name="P1" style:family="paragraph" style:parent-style-name="Standard">
      <style:paragraph-properties fo:margin-left="0in" fo:margin-right="0in" fo:orphans="2" fo:widows="2" fo:text-indent="0in" style:auto-text-indent="false"/>
      <style:text-properties fo:font-variant="normal" fo:text-transform="none" fo:color="#000000" loext:opacity="100%" style:font-name="Roboto" fo:font-size="16pt" fo:letter-spacing="normal" fo:font-style="normal" fo:font-weight="bold" style:font-size-asian="16pt" style:font-weight-asian="bold" style:font-size-complex="16pt" style:font-weight-complex="bold"/>
    </style:style>
    <style:style style:name="P2" style:family="paragraph" style:parent-style-name="Standard">
      <style:paragraph-properties fo:margin-left="0in" fo:margin-right="0in" fo:orphans="2" fo:widows="2" fo:text-indent="0in" style:auto-text-indent="false"/>
      <style:text-properties fo:font-variant="normal" fo:text-transform="none" fo:color="#000000" loext:opacity="100%" style:font-name="Roboto" fo:font-size="12pt" fo:letter-spacing="normal" fo:font-style="normal" fo:font-weight="normal" officeooo:rsid="001ffba1" officeooo:paragraph-rsid="001ffba1" style:font-size-asian="12pt" style:font-weight-asian="normal" style:font-size-complex="12pt" style:font-weight-complex="normal"/>
    </style:style>
    <style:style style:name="P3" style:family="paragraph" style:parent-style-name="Standard">
      <style:paragraph-properties fo:margin-left="0in" fo:margin-right="0in" fo:orphans="2" fo:widows="2" fo:text-indent="0in" style:auto-text-indent="false"/>
      <style:text-properties fo:font-variant="normal" fo:text-transform="none" fo:color="#000000" loext:opacity="100%" style:font-name="Roboto" fo:font-size="12pt" fo:letter-spacing="normal" fo:font-style="normal" fo:font-weight="normal" officeooo:rsid="0023a056" officeooo:paragraph-rsid="0023a056" style:font-size-asian="12pt" style:font-weight-asian="normal" style:font-size-complex="12pt" style:font-weight-complex="normal"/>
    </style:style>
    <style:style style:name="P4" style:family="paragraph" style:parent-style-name="Standard">
      <style:paragraph-properties fo:margin-left="0in" fo:margin-right="0in" fo:orphans="2" fo:widows="2" fo:text-indent="0in" style:auto-text-indent="false"/>
      <style:text-properties fo:font-variant="normal" fo:text-transform="none" fo:color="#000000" loext:opacity="100%" style:font-name="Roboto" fo:font-size="12pt" fo:letter-spacing="normal" fo:font-style="normal" fo:font-weight="normal"/>
    </style:style>
    <style:style style:name="P5" style:family="paragraph" style:parent-style-name="Standard">
      <style:paragraph-properties fo:margin-left="0in" fo:margin-right="0in" fo:orphans="2" fo:widows="2" fo:text-indent="0in" style:auto-text-indent="false"/>
      <style:text-properties fo:font-variant="normal" fo:text-transform="none" fo:color="#000000" loext:opacity="100%" style:font-name="Roboto" fo:font-size="12pt" fo:letter-spacing="normal" fo:font-style="normal" fo:font-weight="normal" officeooo:rsid="00210d2f" officeooo:paragraph-rsid="00210d2f"/>
    </style:style>
    <style:style style:name="P6" style:family="paragraph" style:parent-style-name="Standard">
      <style:paragraph-properties fo:margin-left="0in" fo:margin-right="0in" fo:orphans="2" fo:widows="2" fo:text-indent="0in" style:auto-text-indent="false"/>
      <style:text-properties officeooo:rsid="001e5f41"/>
    </style:style>
    <style:style style:name="P7" style:family="paragraph" style:parent-style-name="Heading_20_2">
      <style:paragraph-properties fo:margin-left="0in" fo:margin-right="0in" fo:orphans="2" fo:widows="2" fo:text-indent="0in" style:auto-text-indent="false"/>
      <style:text-properties officeooo:rsid="001e5f41" officeooo:paragraph-rsid="001e5f41"/>
    </style:style>
    <style:style style:name="P8" style:family="paragraph" style:parent-style-name="Table_20_Contents">
      <style:text-properties fo:font-size="2pt" style:font-size-asian="2pt" style:font-size-complex="2pt"/>
    </style:style>
    <style:style style:name="P9" style:family="paragraph" style:parent-style-name="Text_20_body">
      <style:text-properties officeooo:rsid="001e5f41"/>
    </style:style>
    <style:style style:name="P10" style:family="paragraph" style:parent-style-name="Text_20_body" style:list-style-name="L1">
      <style:text-properties officeooo:rsid="001e5f41"/>
    </style:style>
    <style:style style:name="P11" style:family="paragraph" style:parent-style-name="Horizontal_20_Line">
      <style:paragraph-properties fo:margin-top="0in" fo:margin-bottom="0.0972in" style:contextual-spacing="false" fo:line-height="115%"/>
      <style:text-properties officeooo:rsid="001e5f41"/>
    </style:style>
    <style:style style:name="P12" style:family="paragraph" style:parent-style-name="Heading_20_2">
      <style:paragraph-properties fo:margin-top="0in" fo:margin-bottom="0.0972in" style:contextual-spacing="false" fo:line-height="115%"/>
      <style:text-properties officeooo:rsid="001e5f41"/>
    </style:style>
    <style:style style:name="P13" style:family="paragraph" style:parent-style-name="Text_20_body" style:list-style-name="L2">
      <style:text-properties officeooo:rsid="001e5f41"/>
    </style:style>
    <style:style style:name="P14" style:family="paragraph" style:parent-style-name="Text_20_body" style:list-style-name="L3">
      <style:text-properties officeooo:rsid="001e5f41"/>
    </style:style>
    <style:style style:name="P15" style:family="paragraph" style:parent-style-name="Text_20_body" style:list-style-name="L4">
      <style:text-properties officeooo:rsid="001e5f41"/>
    </style:style>
    <style:style style:name="P16" style:family="paragraph" style:parent-style-name="Text_20_body" style:list-style-name="L5">
      <style:text-properties officeooo:rsid="001e5f41"/>
    </style:style>
    <style:style style:name="P17" style:family="paragraph" style:parent-style-name="Text_20_body" style:list-style-name="L6">
      <style:text-properties officeooo:rsid="001e5f41"/>
    </style:style>
    <style:style style:name="P18" style:family="paragraph" style:parent-style-name="Text_20_body" style:list-style-name="L7">
      <style:text-properties officeooo:rsid="001e5f41"/>
    </style:style>
    <style:style style:name="P19" style:family="paragraph" style:parent-style-name="Heading_20_3">
      <style:paragraph-properties fo:margin-top="0in" fo:margin-bottom="0.0972in" style:contextual-spacing="false" fo:line-height="115%"/>
      <style:text-properties officeooo:rsid="001e5f41"/>
    </style:style>
    <style:style style:name="P20" style:family="paragraph" style:parent-style-name="Preformatted_20_Text">
      <style:paragraph-properties fo:margin-left="0in" fo:margin-right="0in" fo:margin-top="0in" fo:margin-bottom="0.0972in" style:contextual-spacing="false" fo:line-height="115%" fo:text-indent="0in" style:auto-text-indent="false" style:writing-mode="lr-tb"/>
      <style:text-properties officeooo:rsid="001e5f41"/>
    </style:style>
    <style:style style:name="P21" style:family="paragraph" style:parent-style-name="Preformatted_20_Text">
      <style:paragraph-properties fo:margin-top="0in" fo:margin-bottom="0.0972in" style:contextual-spacing="false" fo:line-height="115%" style:writing-mode="lr-tb"/>
      <style:text-properties officeooo:rsid="001e5f41"/>
    </style:style>
    <style:style style:name="P22" style:family="paragraph" style:parent-style-name="Preformatted_20_Text">
      <style:paragraph-properties fo:margin-top="0in" fo:margin-bottom="0.0972in" style:contextual-spacing="false" fo:line-height="115%" style:writing-mode="lr-tb"/>
      <style:text-properties officeooo:paragraph-rsid="00225da6"/>
    </style:style>
    <style:style style:name="P23" style:family="paragraph" style:parent-style-name="Preformatted_20_Text">
      <style:paragraph-properties fo:margin-top="0in" fo:margin-bottom="0.1965in" style:contextual-spacing="false" fo:line-height="115%" style:writing-mode="lr-tb"/>
      <style:text-properties officeooo:rsid="001e5f41"/>
    </style:style>
    <style:style style:name="P24" style:family="paragraph" style:parent-style-name="Text_20_body">
      <style:paragraph-properties fo:margin-left="0in" fo:margin-right="0in" fo:orphans="2" fo:widows="2" fo:text-indent="0in" style:auto-text-indent="false"/>
      <style:text-properties officeooo:rsid="001e5f41" officeooo:paragraph-rsid="001e5f41"/>
    </style:style>
    <style:style style:name="P25" style:family="paragraph" style:parent-style-name="Standard">
      <style:paragraph-properties fo:margin-left="0in" fo:margin-right="0in" fo:orphans="2" fo:widows="2" fo:text-indent="0in" style:auto-text-indent="false"/>
      <style:text-properties officeooo:rsid="001e5f41" officeooo:paragraph-rsid="001e5f41"/>
    </style:style>
    <style:style style:name="P26" style:family="paragraph" style:parent-style-name="Heading_20_3">
      <style:paragraph-properties fo:margin-left="0in" fo:margin-right="0in" fo:orphans="2" fo:widows="2" fo:text-indent="0in" style:auto-text-indent="false"/>
      <style:text-properties officeooo:rsid="001e5f41" officeooo:paragraph-rsid="001e5f41"/>
    </style:style>
    <style:style style:name="P27" style:family="paragraph" style:parent-style-name="Text_20_body">
      <style:text-properties officeooo:rsid="001e5f41" officeooo:paragraph-rsid="00225da6"/>
    </style:style>
    <style:style style:name="P28" style:family="paragraph" style:parent-style-name="Text_20_body">
      <style:text-properties officeooo:rsid="001e5f41" officeooo:paragraph-rsid="002434c0"/>
    </style:style>
    <style:style style:name="P29" style:family="paragraph" style:parent-style-name="Text_20_body" style:list-style-name="L8">
      <style:text-properties officeooo:rsid="001e5f41"/>
    </style:style>
    <style:style style:name="P30" style:family="paragraph" style:parent-style-name="Text_20_body">
      <style:text-properties officeooo:rsid="002434c0" officeooo:paragraph-rsid="002434c0"/>
    </style:style>
    <style:style style:name="P31" style:family="paragraph" style:parent-style-name="Text_20_body">
      <style:text-properties officeooo:paragraph-rsid="002434c0"/>
    </style:style>
    <style:style style:name="T1" style:family="text">
      <style:text-properties fo:font-weight="bold" officeooo:rsid="0023a056" style:font-weight-asian="bold" style:font-weight-complex="bold"/>
    </style:style>
    <style:style style:name="T2" style:family="text">
      <style:text-properties style:text-position="super 58%" fo:font-weight="bold" officeooo:rsid="0023a056" style:font-weight-asian="bold" style:font-weight-complex="bold"/>
    </style:style>
    <style:style style:name="T3" style:family="text">
      <style:text-properties officeooo:rsid="0023a056"/>
    </style:style>
    <style:style style:name="T4" style:family="text">
      <style:text-properties fo:font-weight="bold" style:font-weight-asian="bold" style:font-weight-complex="bold"/>
    </style:style>
    <style:style style:name="T5" style:family="text">
      <style:text-properties style:text-position="super 58%" fo:font-weight="bold" style:font-weight-asian="bold" style:font-weight-complex="bold"/>
    </style:style>
    <style:style style:name="T6" style:family="text">
      <style:text-properties officeooo:rsid="001ffba1"/>
    </style:style>
    <style:style style:name="T7" style:family="text">
      <style:text-properties officeooo:rsid="001e5f41"/>
    </style:style>
    <style:style style:name="T8" style:family="text">
      <style:text-properties fo:font-variant="normal" fo:text-transform="none" fo:color="#000000" loext:opacity="100%" fo:font-family="'Google Sans', Arial, sans-serif" fo:font-size="10pt" fo:letter-spacing="normal" fo:font-style="normal" fo:font-weight="normal" style:font-size-asian="10pt" style:font-weight-asian="normal" style:font-size-complex="10pt" style:font-weight-complex="normal"/>
    </style:style>
    <style:style style:name="T9" style:family="text">
      <style:text-properties fo:font-variant="normal" fo:text-transform="none" fo:color="#000000" loext:opacity="100%" fo:font-family="'Google Sans', Arial, sans-serif" fo:font-size="10pt" fo:letter-spacing="normal" fo:font-style="normal" fo:font-weight="normal" officeooo:rsid="00225da6" style:font-size-asian="10pt" style:font-weight-asian="normal" style:font-size-complex="10pt" style:font-weight-complex="normal"/>
    </style:style>
    <style:style style:name="T10" style:family="text">
      <style:text-properties fo:color="#000000" loext:opacity="100%" fo:font-size="10pt" fo:font-weight="normal" style:font-size-asian="10pt" style:font-weight-asian="normal" style:font-size-complex="10pt" style:font-weight-complex="normal"/>
    </style:style>
    <style:style style:name="T11" style:family="text">
      <style:text-properties officeooo:rsid="002434c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0 Years of Global Vehicle Production: Cycles, Shocks, and Structural Change</text:p>
      <text:p text:style-name="P1"/>
      <text:p text:style-name="P2">The goal of this project is to analyze the market sentiment towards electric vehicles, and how much it will affect in the long term and short term.</text:p>
      <text:p text:style-name="P2"/>
      <text:p text:style-name="P2"><text:span text:style-name="Strong_20_Emphasis">Testable Hypothesis:</text:span><text:line-break/><text:span text:style-name="T1">1</text:span><text:span text:style-name="T2">st</text:span><text:span text:style-name="T3">. </text:span>In countries with strong cultural support for green energy, individuals with pro-environmental attitudes and higher economic means are more likely to adopt plug-in electric vehicles (PEVs) earlier, while individuals with lower economic means or weaker environmental attitudes will adopt PEVs more gradually, continuing to prefer conventional combustion-engine vehicles.</text:p>
      <text:p text:style-name="P3"><text:span text:style-name="T4">2</text:span><text:span text:style-name="T5">nd</text:span>. Due to the fast adoption to PEVs in these countries with <text:span text:style-name="T6">pro-environmental attitudes and higher economic means</text:span>, the car cycle of buying new cars has been modified, making a reboot to the car cycle with many cars bought recently but slowing down future car sales due to reduced need for new cars.</text:p>
      <text:p text:style-name="P4"/>
      <text:p text:style-name="P5">Resources: </text:p>
      <text:p text:style-name="P5"/>
      <text:p text:style-name="P4">For this analysis, I will be using publicly available data sources, including Wikipedia and other freely accessible datasets. While these sources provide comprehensive coverage of global motor vehicle production, their figures may differ slightly from the official statistics reported by OICA. These discrepancies arise from differences in methodology, reporting periods, and data definitions. Where possible, I have cross-checked multiple sources to ensure accuracy and consistency for this project.</text:p>
      <text:p text:style-name="P4"/>
      <text:p text:style-name="P6"/>
      <text:h text:style-name="P7" text:outline-level="2"><text:span text:style-name="Strong_20_Emphasis">1. Global Car Exports — Comparison 2023–2025 (Values &amp; Shares)</text:span></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text:span text:style-name="Strong_20_Emphasis">Category</text:span></text:p>
            </table:table-cell>
            <table:table-cell table:style-name="Table1.A1" office:value-type="string">
              <text:p text:style-name="Table_20_Heading"><text:span text:style-name="Strong_20_Emphasis">2023 Value (US$B)</text:span></text:p>
            </table:table-cell>
            <table:table-cell table:style-name="Table1.A1" office:value-type="string">
              <text:p text:style-name="Table_20_Heading"><text:span text:style-name="Strong_20_Emphasis">2024 Value (US$B)</text:span></text:p>
            </table:table-cell>
            <table:table-cell table:style-name="Table1.A1" office:value-type="string">
              <text:p text:style-name="Table_20_Heading"><text:span text:style-name="Strong_20_Emphasis">2025 Trend / Proxy</text:span></text:p>
            </table:table-cell>
            <table:table-cell table:style-name="Table1.A1" office:value-type="string">
              <text:p text:style-name="Table_20_Heading"><text:span text:style-name="Strong_20_Emphasis">YoY Change Example</text:span></text:p>
            </table:table-cell>
          </table:table-row>
        </table:table-header-rows>
        <table:table-row>
          <table:table-cell table:style-name="Table1.A1" office:value-type="string">
            <text:p text:style-name="Table_20_Contents"><text:span text:style-name="Strong_20_Emphasis">All Cars</text:span></text:p>
          </table:table-cell>
          <table:table-cell table:style-name="Table1.A1" office:value-type="string">
            <text:p text:style-name="Table_20_Contents">~959.5</text:p>
          </table:table-cell>
          <table:table-cell table:style-name="Table1.A1" office:value-type="string">
            <text:p text:style-name="Table_20_Contents">958.9</text:p>
          </table:table-cell>
          <table:table-cell table:style-name="Table1.A1" office:value-type="string">
            <text:p text:style-name="Table_20_Contents">Production ≈ 92.5M units globally – slight decline from 2024 </text:p>
          </table:table-cell>
          <table:table-cell table:style-name="Table1.A1" office:value-type="string">
            <text:p text:style-name="Table_20_Contents">N/A</text:p>
          </table:table-cell>
        </table:table-row>
        <table:table-row>
          <table:table-cell table:style-name="Table1.A1" office:value-type="string">
            <text:p text:style-name="Table_20_Contents"><text:span text:style-name="Strong_20_Emphasis">Electric Cars (EVs)</text:span></text:p>
          </table:table-cell>
          <table:table-cell table:style-name="Table1.A1" office:value-type="string">
            <text:p text:style-name="Table_20_Contents">~150.6 (Export value in 2023) </text:p>
          </table:table-cell>
          <table:table-cell table:style-name="Table1.A1" office:value-type="string">
            <text:p text:style-name="Table_20_Contents">141.5 </text:p>
          </table:table-cell>
          <table:table-cell table:style-name="Table1.A1" office:value-type="string">
            <text:p text:style-name="Table_20_Contents">China 2025 EV exports large but slowing; clean tech exports including EVs ~US$69B </text:p>
          </table:table-cell>
          <table:table-cell table:style-name="Table1.A1" office:value-type="string">
            <text:p text:style-name="Table_20_Contents">2023→2024 EV exports fell</text:p>
          </table:table-cell>
        </table:table-row>
        <table:table-row>
          <table:table-cell table:style-name="Table1.A1" office:value-type="string">
            <text:p text:style-name="Table_20_Contents"><text:span text:style-name="Strong_20_Emphasis">EV share of exports</text:span></text:p>
          </table:table-cell>
          <table:table-cell table:style-name="Table1.A1" office:value-type="string">
            <text:p text:style-name="Table_20_Contents">~15.7% (2023) </text:p>
          </table:table-cell>
          <table:table-cell table:style-name="Table1.A1" office:value-type="string">
            <text:p text:style-name="Table_20_Contents">~14.8% (2024) (your reported)</text:p>
          </table:table-cell>
          <table:table-cell table:style-name="Table1.A1" office:value-type="string">
            <text:p text:style-name="Table_20_Contents">EM sources indicate global EV export volumes continue to grow but value mix may shift</text:p>
          </table:table-cell>
          <table:table-cell table:style-name="Table1.A1" office:value-type="string">
            <text:p text:style-name="P8"/>
          </table:table-cell>
        </table:table-row>
      </table:table>
      <text:p text:style-name="P9"><text:span text:style-name="Strong_20_Emphasis">Notes:</text:span></text:p>
      <text:list text:style-name="L1">
        <text:list-item>
          <text:p text:style-name="P10">2023 car export value (all vehicles) was ~US$959.5 B with EV exports at ~US$150.6 B. </text:p>
        </text:list-item>
        <text:list-item>
          <text:p text:style-name="P10">For 2025, broad export value data isn’t yet consolidated, but China’s EV export volumes are high, and clean technology exports (including EVs) are strong (~US$69 B for EVs). </text:p>
        </text:list-item>
      </text:list>
      <text:p text:style-name="P11"/>
      <text:h text:style-name="P12" text:outline-level="2"><text:soft-page-break/><text:span text:style-name="Strong_20_Emphasis">2. Global Car Imports — Comparison 2023–2024–2025 (Values)</text:span></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text:span text:style-name="Strong_20_Emphasis">Category</text:span></text:p>
            </table:table-cell>
            <table:table-cell table:style-name="Table2.A1" office:value-type="string">
              <text:p text:style-name="Table_20_Heading"><text:span text:style-name="Strong_20_Emphasis">2023 Value (US$B)</text:span></text:p>
            </table:table-cell>
            <table:table-cell table:style-name="Table2.A1" office:value-type="string">
              <text:p text:style-name="Table_20_Heading"><text:span text:style-name="Strong_20_Emphasis">2024 Value (US$B)</text:span></text:p>
            </table:table-cell>
            <table:table-cell table:style-name="Table2.A1" office:value-type="string">
              <text:p text:style-name="Table_20_Heading"><text:span text:style-name="Strong_20_Emphasis">2025 Trend</text:span></text:p>
            </table:table-cell>
            <table:table-cell table:style-name="Table2.A1" office:value-type="string">
              <text:p text:style-name="Table_20_Heading"><text:span text:style-name="Strong_20_Emphasis">Share</text:span></text:p>
            </table:table-cell>
          </table:table-row>
        </table:table-header-rows>
        <table:table-row>
          <table:table-cell table:style-name="Table2.A1" office:value-type="string">
            <text:p text:style-name="Table_20_Contents">All Cars</text:p>
          </table:table-cell>
          <table:table-cell table:style-name="Table2.A1" office:value-type="string">
            <text:p text:style-name="Table_20_Contents">(Total imported car value ~ data unspecified globally – BUT top country imports) </text:p>
          </table:table-cell>
          <table:table-cell table:style-name="Table2.A1" office:value-type="string">
            <text:p text:style-name="Table_20_Contents">979.6</text:p>
          </table:table-cell>
          <table:table-cell table:style-name="Table2.A1" office:value-type="string">
            <text:p text:style-name="Table_20_Contents">N/A</text:p>
          </table:table-cell>
          <table:table-cell table:style-name="Table2.A1" office:value-type="string">
            <text:p text:style-name="Table_20_Contents">~4.1% (global share)</text:p>
          </table:table-cell>
        </table:table-row>
        <table:table-row>
          <table:table-cell table:style-name="Table2.A1" office:value-type="string">
            <text:p text:style-name="Table_20_Contents">Electric Cars</text:p>
          </table:table-cell>
          <table:table-cell table:style-name="Table2.A1" office:value-type="string">
            <text:p text:style-name="Table_20_Contents">N/A globally</text:p>
          </table:table-cell>
          <table:table-cell table:style-name="Table2.A1" office:value-type="string">
            <text:p text:style-name="Table_20_Contents">145.2</text:p>
          </table:table-cell>
          <table:table-cell table:style-name="Table2.A1" office:value-type="string">
            <text:p text:style-name="Table_20_Contents">N/A</text:p>
          </table:table-cell>
          <table:table-cell table:style-name="Table2.A1" office:value-type="string">
            <text:p text:style-name="Table_20_Contents">~14.8%</text:p>
          </table:table-cell>
        </table:table-row>
      </table:table>
      <text:p text:style-name="P9"><text:span text:style-name="Strong_20_Emphasis">Proxies from country-level data:</text:span></text:p>
      <text:list text:style-name="L2">
        <text:list-item>
          <text:p text:style-name="P13">In 2023, top global importers: U.S. ~US$210.3 B, Germany ~78.1, UK ~56.5, France ~46.3, China ~45.9 B. </text:p>
        </text:list-item>
        <text:list-item>
          <text:p text:style-name="P13">That 2023 total already highlights how sizeable overall imports are compared with EV export/import values.</text:p>
        </text:list-item>
      </text:list>
      <text:p text:style-name="P11"/>
      <text:h text:style-name="P12" text:outline-level="2"><text:span text:style-name="Strong_20_Emphasis">3. Car Imports by Continent — 2023 vs 2024 vs 2025</text:span></text:h>
      <text:p text:style-name="P9"><text:span text:style-name="Strong_20_Emphasis">2023 (Approximate Shares)</text:span><text:line-break/><text:span text:style-name="Emphasis">(Based on imports of all cars, multiple country-level totals)</text:span></text:p>
      <text:list text:style-name="L3">
        <text:list-item>
          <text:p text:style-name="P14"><text:span text:style-name="Strong_20_Emphasis">North America</text:span> ~27.5%</text:p>
        </text:list-item>
        <text:list-item>
          <text:p text:style-name="P14"><text:span text:style-name="Strong_20_Emphasis">Asia</text:span> ~19.1%</text:p>
        </text:list-item>
        <text:list-item>
          <text:p text:style-name="P14"><text:span text:style-name="Strong_20_Emphasis">Oceania</text:span> ~3%</text:p>
        </text:list-item>
        <text:list-item>
          <text:p text:style-name="P14"><text:span text:style-name="Strong_20_Emphasis">Latin America</text:span> ~2.7%</text:p>
        </text:list-item>
        <text:list-item>
          <text:p text:style-name="P14"><text:span text:style-name="Strong_20_Emphasis">Africa</text:span> ~2.1% </text:p>
        </text:list-item>
      </text:list>
      <text:p text:style-name="P9"><text:span text:style-name="Strong_20_Emphasis">2024 (Your Provided)</text:span><text:line-break/>Europe (45.3%) | N. America (28.2%) | Asia (18.8%) | LatAm/Carib (3%) | Oceania (2.8%) | Africa (1.9%)</text:p>
      <text:p text:style-name="P9"><text:span text:style-name="Strong_20_Emphasis">2025 Trend (Indicative)</text:span></text:p>
      <text:list text:style-name="L4">
        <text:list-item>
          <text:p text:style-name="P15">EV sales share globally rose sharply (~&gt;25% of total car sales), driven by non‑OECD markets. </text:p>
        </text:list-item>
        <text:list-item>
          <text:p text:style-name="P15">This likely means <text:span text:style-name="Strong_20_Emphasis">EV import share (2025)</text:span> has grown further in Europe/N. America relative to 2024 — though precise dollar splits by continent for 2025 aren’t published yet.</text:p>
        </text:list-item>
      </text:list>
      <text:p text:style-name="P11"/>
      <text:h text:style-name="P12" text:outline-level="2"><text:span text:style-name="Strong_20_Emphasis">4. Top 5 Importing Countries — 2023 vs 2024</text:span></text:h>
      <text:p text:style-name="P9"><text:span text:style-name="Strong_20_Emphasis">2023 (By Dollar Value — Top 5)</text:span></text:p>
      <text:list text:style-name="L5">
        <text:list-item>
          <text:p text:style-name="P16">United States ~US$210.3 B</text:p>
        </text:list-item>
        <text:list-item>
          <text:p text:style-name="P16">Germany ~78.1 B</text:p>
        </text:list-item>
        <text:list-item>
          <text:p text:style-name="P16">United Kingdom ~56.5 B</text:p>
        </text:list-item>
        <text:list-item>
          <text:p text:style-name="P16"><text:soft-page-break/>France ~46.3 B</text:p>
        </text:list-item>
        <text:list-item>
          <text:p text:style-name="P16">Mainland China ~45.9 B <text:line-break/>(<text:span text:style-name="Emphasis">Combined share ~70.6% of global car imports</text:span>)</text:p>
        </text:list-item>
      </text:list>
      <text:p text:style-name="P9"><text:span text:style-name="Strong_20_Emphasis">2024 (Your Provided)</text:span></text:p>
      <text:list text:style-name="L6">
        <text:list-item>
          <text:p text:style-name="P17">USA</text:p>
        </text:list-item>
        <text:list-item>
          <text:p text:style-name="P17">Germany</text:p>
        </text:list-item>
        <text:list-item>
          <text:p text:style-name="P17">UK</text:p>
        </text:list-item>
        <text:list-item>
          <text:p text:style-name="P17">France</text:p>
        </text:list-item>
        <text:list-item>
          <text:p text:style-name="P17">Belgium<text:line-break/>Combined share: 44.4%</text:p>
        </text:list-item>
      </text:list>
      <text:p text:style-name="P9"><text:span text:style-name="Strong_20_Emphasis">2025 Trend (Indicative)</text:span></text:p>
      <text:list text:style-name="L7">
        <text:list-item>
          <text:p text:style-name="P18">Emerging import markets like Mexico, UAE and others have risen within China vehicle import volumes in 2025 but top five list globally will still be dominated by developed markets. </text:p>
        </text:list-item>
      </text:list>
      <text:p text:style-name="P11"/>
      <text:h text:style-name="P12" text:outline-level="2"><text:span text:style-name="Strong_20_Emphasis">5. Visual Chart Templates with 2023–2025 Dimensions</text:span></text:h>
      <text:h text:style-name="P19" text:outline-level="3"><text:span text:style-name="Strong_20_Emphasis">Chart 1 – Global Car Exports vs EV Exports (Value)</text:span></text:h>
      <text:p text:style-name="P20"><text:span text:style-name="Source_20_Text">2023</text:span></text:p>
      <text:p text:style-name="P21"><text:span text:style-name="Source_20_Text">All: █████████████████████ 959.5B</text:span></text:p>
      <text:p text:style-name="P21"><text:span text:style-name="Source_20_Text">EV: <text:s/>██████ 150.6B</text:span></text:p>
      <text:p text:style-name="P21"><text:span text:style-name="Source_20_Text">2024</text:span></text:p>
      <text:p text:style-name="P21"><text:span text:style-name="Source_20_Text">All: █████████████████████ 958.9B</text:span></text:p>
      <text:p text:style-name="P21"><text:span text:style-name="Source_20_Text">EV: <text:s/>██████ 141.5B</text:span></text:p>
      <text:p text:style-name="P21"><text:span text:style-name="Source_20_Text">2025 (trend)</text:span></text:p>
      <text:p text:style-name="P21"><text:span text:style-name="Source_20_Text">All: █████████████████████ ???B</text:span></text:p>
      <text:p text:style-name="P22"><text:span text:style-name="Source_20_Text"><text:span text:style-name="T7">EV: <text:s/>█████? </text:span></text:span><text:span text:style-name="Source_20_Text"><text:span text:style-name="T8">142.4</text:span></text:span><text:span text:style-name="Source_20_Text"><text:span text:style-name="T9">B</text:span></text:span><text:span text:style-name="Source_20_Text"><text:span text:style-name="T10"> </text:span></text:span><text:span text:style-name="Source_20_Text"><text:span text:style-name="T7">highest volumes but value share mixed</text:span></text:span></text:p>
      <text:h text:style-name="P19" text:outline-level="3"><text:span text:style-name="Strong_20_Emphasis">Chart 2 – Global Car Imports vs EV Imports (Value)</text:span></text:h>
      <text:p text:style-name="P20"><text:span text:style-name="Source_20_Text">2023 (indicative)</text:span></text:p>
      <text:p text:style-name="P21"><text:span text:style-name="Source_20_Text">All: █████████████████████ ???B</text:span></text:p>
      <text:p text:style-name="P21"><text:span text:style-name="Source_20_Text">EV: <text:s/>██████? (fragment, based on top import countries)</text:span></text:p>
      <text:p text:style-name="P21"><text:span text:style-name="Source_20_Text">2024</text:span></text:p>
      <text:p text:style-name="P21"><text:span text:style-name="Source_20_Text">All: █████████████████████ 979.6B</text:span></text:p>
      <text:p text:style-name="P21"><text:span text:style-name="Source_20_Text">EV: <text:s/>██████ 145.2B</text:span></text:p>
      <text:p text:style-name="P21"><text:span text:style-name="Source_20_Text">2025 (trend)</text:span></text:p>
      <text:p text:style-name="P21"><text:span text:style-name="Source_20_Text">All: █████████████████████ ???B</text:span></text:p>
      <text:p text:style-name="P21"><text:soft-page-break/><text:span text:style-name="Source_20_Text">EV: <text:s/>██████? (likely rising share)</text:span></text:p>
      <text:h text:style-name="P19" text:outline-level="3"><text:span text:style-name="Strong_20_Emphasis">Chart 3 – EV Imports by Continent (2024)</text:span></text:h>
      <text:p text:style-name="P9"><text:span text:style-name="Emphasis">(same as you provided — 2025 trending toward larger shares in Europe &amp; North America)</text:span></text:p>
      <text:p text:style-name="P20"><text:span text:style-name="Source_20_Text">Europe <text:s text:c="5"/>█████████████ 58.7%</text:span></text:p>
      <text:p text:style-name="P21"><text:span text:style-name="Source_20_Text">North America █████ 21.9%</text:span></text:p>
      <text:p text:style-name="P21"><text:span text:style-name="Source_20_Text">Asia <text:s text:c="8"/>███ 14.5%</text:span></text:p>
      <text:p text:style-name="P21"><text:span text:style-name="Source_20_Text">Oceania <text:s text:c="5"/>▌ 2.5%</text:span></text:p>
      <text:p text:style-name="P21"><text:span text:style-name="Source_20_Text">LatAm <text:s text:c="7"/>▌ 2%</text:span></text:p>
      <text:p text:style-name="P23"><text:span text:style-name="Source_20_Text">Africa <text:s text:c="6"/>▏ 0.4%</text:span></text:p>
      <text:p text:style-name="P24"><text:span text:style-name="Source_20_Text"/></text:p>
      <text:p text:style-name="P25"/>
      <text:p text:style-name="P25"/>
      <text:h text:style-name="P26" text:outline-level="3">Response to the Hypothesis</text:h>
      <text:p text:style-name="P27"><text:span text:style-name="Strong_20_Emphasis">Observations from the data:</text:span></text:p>
      <text:p text:style-name="P27">Global EV adoption is clearly accelerating but still accounts for only ~15% of worldwide car trade, up from ~5% in 2020. Europe remains the leader in both EV imports and exports, underscoring the impact of strong cultural and policy support for green energy. Early adoption is concentrated among higher-income, environmentally conscious consumers, while most markets continue to rely on conventional combustion vehicles.</text:p>
      <text:p text:style-name="P9">Notably, year-over-year EV sales declined 7%, compared with a 1.8% drop in total car sales. This pattern suggests that in wealthier markets, the transition to EVs has accelerated replacement cycles, as a substantial portion of vehicle fleets was upgraded to electric. Once these vehicles are in use, the need for further replacements is deferred for years, slowing near-term growth in overall car sales. Meanwhile, the majority of consumers remain committed to conventional vehicles, creating a bifurcated adoption curve.</text:p>
      <text:p text:style-name="P9">For investors, this points to a market in structural transition: short-term growth may appear muted, but long-term demand for EV infrastructure, supporting technology, and battery supply chains is likely to expand steadily. The uneven pace of adoption across income groups and regions also highlights the importance of targeting markets with both high environmental awareness and sufficient economic capacity for early EV uptake.</text:p>
      <text:p text:style-name="P9"/>
      <text:p text:style-name="P9"/>
      <text:p text:style-name="P9"/>
      <text:p text:style-name="P9"/>
      <text:p text:style-name="P9"/>
      <text:p text:style-name="P9"/>
      <text:p text:style-name="P9"/>
      <text:p text:style-name="P28"><text:soft-page-break/><text:span text:style-name="T11">I’m </text:span>implicitly assuming:</text:p>
      <text:list text:style-name="L8">
        <text:list-item>
          <text:p text:style-name="P29">EV adoption reduces total vehicle demand.</text:p>
        </text:list-item>
        <text:list-item>
          <text:p text:style-name="P29">Car markets behave like replacement cycles (once fleet is newer, demand drops).</text:p>
        </text:list-item>
        <text:list-item>
          <text:p text:style-name="P29">Developed countries have already “front-loaded” purchases.</text:p>
        </text:list-item>
        <text:list-item>
          <text:p text:style-name="P29">EV adoption correlates with saturation rather than growth.</text:p>
          <text:p text:style-name="P29"/>
        </text:list-item>
      </text:list>
      <text:p text:style-name="P28">So a drop vs. 2018 may reflect: </text:p>
      <text:p text:style-name="P28">pandemic effects</text:p>
      <text:p text:style-name="P28">inflation and interest rates</text:p>
      <text:p text:style-name="P28">supply constraints</text:p>
      <text:p text:style-name="P28">policy cycles</text:p>
      <text:p text:style-name="P9"/>
      <text:p text:style-name="P9"/>
      <text:p text:style-name="P28"><text:span text:style-name="T11">M</text:span>any countries still have <text:span text:style-name="Strong_20_Emphasis">growing vehicle density</text:span></text:p>
      <text:p text:style-name="P28">EV tech upgrades may <text:span text:style-name="Strong_20_Emphasis">increase replacement frequency</text:span> (battery, range improvements)</text:p>
      <text:p text:style-name="P30">(We can analyse this with the currently avalible data in our project)</text:p>
      <text:p text:style-name="P31"><text:span text:style-name="T11">(We can also compare </text:span>EV share vs fleet size<text:span text:style-name="T11">)</text:span></text:p>
      <text:p text:style-name="P31"><text:span text:style-name="T11">(We can look at </text:span>EV share vs total sales growth rate. <text:span text:style-name="T11">To give an extra layer of verification to our hypothesi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8T05:44:23.475801800</meta:creation-date>
    <dc:date>2026-02-19T20:56:31.118485500</dc:date>
    <meta:editing-duration>P4DT16H50M20S</meta:editing-duration>
    <meta:editing-cycles>3</meta:editing-cycles>
    <meta:generator>LibreOffice/25.8.4.2$Windows_X86_64 LibreOffice_project/290daaa01b999472f0c7a3890eb6a550fd74c6df</meta:generator>
    <meta:document-statistic meta:table-count="2" meta:image-count="0" meta:object-count="0" meta:page-count="5" meta:paragraph-count="124" meta:word-count="1079" meta:character-count="6879" meta:non-whitespace-character-count="5890"/>
  </office:meta>
</office:document-meta>
</file>